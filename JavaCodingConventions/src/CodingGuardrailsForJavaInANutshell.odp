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Focus2-outline1" style:list-style-name="L2">
      <style:graphic-properties fo:min-height="11.929cm" loext:decorativ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.27cm"/>
      <style:text-properties fo:hyphenate="false" loext:hyphenation-no-caps="false" loext:hyphenation-no-last-word="false"/>
    </style:style>
    <style:style style:name="P2" style:family="paragraph">
      <style:paragraph-properties fo:margin-top="0cm" fo:margin-bottom="0.27cm"/>
      <style:text-properties fo:font-weight="bold" style:font-weight-asian="bold" style:font-weight-complex="bold" fo:hyphenate="false" loext:hyphenation-no-caps="false" loext:hyphenation-no-last-word="false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2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2.63cm" svg:x="4.903cm" svg:y="0.627cm" presentation:class="title" presentation:user-transformed="true">
          <draw:text-box>
            <text:p>Coding Guardrails for Java in a Nutshell</text:p>
          </draw:text-box>
        </draw:frame>
        <draw:frame presentation:style-name="pr2" draw:text-style-name="P2" draw:layer="layout" svg:width="19cm" svg:height="10cm" svg:x="4.5cm" svg:y="3cm" presentation:class="outline" presentation:user-transformed="true">
          <draw:text-box>
            <text:list text:style-name="L2">
              <text:list-item>
                <text:p text:style-name="P1">Beautiful is better than ugly.</text:p>
              </text:list-item>
              <text:list-item>
                <text:p text:style-name="P1">Explicit is better than implicit, and verbosity is your friend.</text:p>
              </text:list-item>
              <text:list-item>
                <text:p text:style-name="P1">Do not repeat yourself.</text:p>
              </text:list-item>
              <text:list-item>
                <text:p text:style-name="P1">Simple is better than complex.</text:p>
              </text:list-item>
              <text:list-item>
                <text:p text:style-name="P1">Complex is better than complicated.</text:p>
              </text:list-item>
              <text:list-item>
                <text:p text:style-name="P1">Flat is better than nested.</text:p>
              </text:list-item>
              <text:list-item>
                <text:p text:style-name="P1">Sparse is better than dense.</text:p>
              </text:list-item>
              <text:list-item>
                <text:p text:style-name="P1">Readability counts.</text:p>
              </text:list-item>
              <text:list-item>
                <text:p text:style-name="P1">Special cases aren't special enough to break the rules …</text:p>
              </text:list-item>
              <text:list-item>
                <text:p text:style-name="P1">… although practicality beats purity.</text:p>
              </text:list-item>
              <text:list-item>
                <text:p text:style-name="P1">Errors should never pass silently and Exceptions may never be swallowed …</text:p>
              </text:list-item>
              <text:list-item>
                <text:p text:style-name="P1">… unless <text:span text:style-name="T1">explicitly</text:span> silenced.</text:p>
              </text:list-item>
              <text:list-item>
                <text:p text:style-name="P1"><text:span text:style-name="T1">Either</text:span> log (and terminate) <text:span text:style-name="T1">or</text:span> throw, neither both.</text:p>
              </text:list-item>
              <text:list-item>
                <text:p text:style-name="P1">In the face of ambiguity, refuse the temptation to guess.</text:p>
              </text:list-item>
              <text:list-item>
                <text:p text:style-name="P1">There should be one – and preferably only one – obvious way to do it …</text:p>
              </text:list-item>
              <text:list-item>
                <text:p text:style-name="P1">… although that way may not be obvious at first.</text:p>
              </text:list-item>
              <text:list-item>
                <text:p text:style-name="P1">Now is better than never …</text:p>
              </text:list-item>
              <text:list-item>
                <text:p text:style-name="P1">… although never is often better than <text:span text:style-name="T1">right </text:span><text:span text:style-name="T1">now</text:span>.</text:p>
              </text:list-item>
              <text:list-item>
                <text:p text:style-name="P1">If the implementation is hard to explain, it's a bad idea.</text:p>
              </text:list-item>
              <text:list-item>
                <text:p text:style-name="P1">If the implementation is easy to explain, it may be a good idea.</text:p>
              </text:list-item>
              <text:list-item>
                <text:p text:style-name="P1">Think about your future self and add a comment.</text:p>
              </text:list-item>
              <text:list-item>
                <text:p text:style-name="P1">Without the unit tests, the code is not complete …</text:p>
              </text:list-item>
              <text:list-item>
                <text:p text:style-name="P1">… neither it will be complete without documentation.</text:p>
              </text:list-item>
              <text:list-item>
                <text:p text:style-name="P1">Always do it right in the first place!</text:p>
              </text:list-item>
              <text:list-item>
                <text:p text:style-name="P1"><text:span text:style-name="T2">Have Fun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Focus3-backgroundobjects">
      <style:graphic-properties draw:stroke="none" draw:fill-color="#780373" draw:textarea-vertical-align="middle" loext:decorative="false"/>
    </style:style>
    <style:style style:name="Mpr28" style:family="presentation" style:parent-style-name="Focus3-backgroundobjects">
      <style:graphic-properties draw:stroke="none" draw:fill-color="#f10d0c" draw:textarea-vertical-align="middle" loext:decorative="false"/>
    </style:style>
    <style:style style:name="Mpr29" style:family="presentation" style:parent-style-name="Focus3-backgroundobjects">
      <style:graphic-properties draw:stroke="none" draw:fill-color="#e8a202" draw:textarea-vertical-align="middle" loext:decorative="false"/>
    </style:style>
    <style:style style:name="Mpr30" style:family="presentation" style:parent-style-name="Focus3-backgroundobjects">
      <style:graphic-properties draw:stroke="none" draw:fill-color="#168253" draw:textarea-vertical-align="middle" loext:decorative="false"/>
    </style:style>
    <style:style style:name="Mpr31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Foliennumm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7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8" draw:text-style-name="MP19" draw:layer="backgroundobjects" svg:width="2.999cm" svg:height="9.499cm" svg:x="0cm" svg:y="0cm" svg:viewBox="0 0 3000 9500" draw:points="0,0 0,9500 3000,0">
        <text:p/>
      </draw:polygon>
      <draw:polygon presentation:style-name="Mpr29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0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1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1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1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Foliennumm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2T09:01:33.379364297</meta:creation-date>
    <meta:editing-duration>PT3M28S</meta:editing-duration>
    <meta:editing-cycles>3</meta:editing-cycles>
    <meta:generator>LibreOffice/24.2.7.2$Linux_X86_64 LibreOffice_project/420$Build-2</meta:generator>
    <dc:title>Focus</dc:title>
    <dc:date>2026-07-22T09:25:44.347390125</dc:date>
    <meta:document-statistic meta:object-count="77"/>
  </office:meta>
</office:document-meta>
</file>